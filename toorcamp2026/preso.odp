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30000014B8EDB4C4C.png" manifest:media-type="image/png"/>
  <manifest:file-entry manifest:full-path="Pictures/100030F400002E9D00002236BC4E3B04.svg" manifest:media-type="image/svg+xml"/>
  <manifest:file-entry manifest:full-path="Pictures/1000000000000640000004B0C0957D45.png" manifest:media-type="image/png"/>
  <manifest:file-entry manifest:full-path="Pictures/100000010000040000000400D670EDE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74cm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Mono PS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<text:line-break/>Learn to Build an Animated LED Strip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 little hardware.</text:p>
            <text:p text:style-name="P1">A little software.</text:p>
            <text:p text:style-name="P1">Looks crispy in the dark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o is it for?</text:p>
          </draw:text-box>
        </draw:frame>
        <draw:frame presentation:style-name="pr4" draw:layer="layout" svg:width="22.5cm" svg:height="9.134cm" svg:x="4.805cm" svg:y="3.566cm" presentation:class="outline" presentation:user-transformed="true">
          <draw:text-box>
            <text:list text:style-name="L2">
              <text:list-item>
                <text:p>You, me, and everyone.</text:p>
              </text:list-item>
              <text:list-item>
                <text:p>We all have brains that can learn. We mastered language, driving cars, and Oxford commas. We can learn to make things.</text:p>
              </text:list-item>
              <text:list-item>
                <text:p>Imposter syndrome is real, and also fake</text:p>
                <text:list>
                  <text:list-item>
                    <text:p>Do it anyw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is is narrowly scoped to animated LEDs</text:p>
          </draw:text-box>
        </draw:frame>
        <draw:frame presentation:style-name="pr4" draw:layer="layout" svg:width="22.5cm" svg:height="9.134cm" svg:x="4.445cm" svg:y="3.8cm" presentation:class="outline" presentation:user-transformed="true">
          <draw:text-box>
            <text:list text:style-name="L2">
              <text:list-item>
                <text:p>Specifically, a microcontroller-driven strip of WS-protocol LEDs. Narrow scope for today, but broad implications for later.</text:p>
              </text:list-item>
              <text:list-item>
                <text:p>Arduino, <text:span text:style-name="T1">ESP32</text:span></text:p>
              </text:list-item>
              <text:list-item>
                <text:p><text:span text:style-name="T1">WS-2812B (NeoPixel)</text:span>, WS-2811, NeoPixel, APA-*, SK-*</text:p>
              </text:list-item>
              <text:list-item>
                <text:p><text:span text:style-name="T1">5V</text:span>, 12V, 24V</text:p>
              </text:list-item>
              <text:list-item>
                <text:p><text:span text:style-name="T1">Arduino IDE</text:span>, native compilers, bootloaders</text:p>
              </text:list-item>
              <text:list-item>
                <text:p>Arduino “language” == C++</text:p>
                <text:list>
                  <text:list-item>
                    <text:p>With some syntactic things like a DSL</text:p>
                    <text:list>
                      <text:list-item>
                        <text:p>Don’t worry about it though; you don’t have to be a C++ expert</text:p>
                        <text:list>
                          <text:list-item>
                            <text:p>It’s pretty straightforward, in fact</text:p>
                            <text:list>
                              <text:list-item>
                                <text:p>Except the occasional template, but really it’s coo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hardware setu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readboards and jumpers and buck converters</text:p>
                <text:list>
                  <text:list-item>
                    <text:p>Good for trying things, adding and removing things in real time.</text:p>
                  </text:list-item>
                  <text:list-item>
                    <text:p>This is not how to build it for production.</text:p>
                    <text:list>
                      <text:list-item>
                        <text:p>Use protoboard / make a circuit board, 3d print an enclosure</text:p>
                      </text:list-item>
                    </text:list>
                  </text:list-item>
                  <text:list-item>
                    <text:p>I am bad at soldering. So I leave teaching that to others.</text:p>
                    <text:list>
                      <text:list-item>
                        <text:p>I am also bad at practicing</text:p>
                      </text:list-item>
                    </text:list>
                  </text:list-item>
                </text:list>
              </text:list-item>
              <text:list-item>
                <text:p>You do not have to design a circuit.</text:p>
                <text:list>
                  <text:list-item>
                    <text:p>This one is easy. It’s also relatively incorrect.</text:p>
                  </text:list-item>
                  <text:list-item>
                    <text:p>It’s a breadboard. (It’s reusable!)</text:p>
                  </text:list-item>
                  <text:list-item>
                    <text:p>The controller is on headers. (Also resuable!)</text:p>
                  </text:list-item>
                  <text:list-item>
                    <text:p>The code is real simple (Also also reusable—but we can go deep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he Circuit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a xlink:href="https://github.com/spacemeat/led_arts/toorcamp2026/led_unshifted-layout.png" xlink:type="simple">https://github.com/spacemeat/led_arts/toorcamp2026/led_unshifted-layout.png</text:a></text:p>
                <text:list>
                  <text:list-item>
                    <text:p>Ignore the “shifted” version; it may be right, but *as yet* I have not tested it, so it’s almost certainly trash</text:p>
                  </text:list-item>
                </text:list>
              </text:list-item>
              <text:list-item>
                <text:p>There are other things in that repo, all of which you can explore. Some stuff is easier to grok than others; I will flesh it out, and get some things up to dat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DE setup and power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rduino IDE is not just for Arduino uCs.</text:p>
                <text:list>
                  <text:list-item>
                    <text:p>ESP32 can be targeted and bootloaded as well.</text:p>
                  </text:list-item>
                  <text:list-item>
                    <text:p>Requires a boards package, easy to install.</text:p>
                    <text:list>
                      <text:list-item>
                        <text:p>Tools→Board→Boards Manager: esp32 by Expressif</text:p>
                      </text:list-item>
                    </text:list>
                  </text:list-item>
                </text:list>
              </text:list-item>
              <text:list-item>
                <text:p>LEDs need their own power.</text:p>
                <text:list>
                  <text:list-item>
                    <text:p>Do not use the 5V rail on the ESP to drive LED power. Magic smoke and stuff.</text:p>
                  </text:list-item>
                  <text:list-item>
                    <text:p>The circuit includes a 12V→5V buck converter and a 12V wall wart</text:p>
                    <text:list>
                      <text:list-item>
                        <text:p>…. right?</text:p>
                      </text:list-item>
                    </text:list>
                  </text:list-item>
                </text:list>
              </text:list-item>
              <text:list-item>
                <text:p>uC needs either USB or 5VDC.</text:p>
                <text:list>
                  <text:list-item>
                    <text:p>Not both! Voltage regulator is finicky.</text:p>
                  </text:list-item>
                  <text:list-item>
                    <text:p>uC can run while LEDs are unpowered; LEDs can run while uC is unpowered.</text:p>
                  </text:list-item>
                  <text:list-item>
                    <text:p>Keep uC on USB until your code is done. Then switch to 5VDC r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ne last thing to set u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FastLED</text:p>
                <text:list>
                  <text:list-item>
                    <text:p>It’s an older code, but it checks out.</text:p>
                    <text:list>
                      <text:list-item>
                        <text:p>Still maintained, and heavily used.</text:p>
                      </text:list-item>
                    </text:list>
                  </text:list-item>
                  <text:list-item>
                    <text:p>Install the library to the IDE</text:p>
                    <text:list>
                      <text:list-item>
                        <text:p>Tools→Manage Libraries-&gt;FastLED</text:p>
                      </text:list-item>
                    </text:list>
                  </text:list-item>
                  <text:list-item>
                    <text:p>What it does for us</text:p>
                    <text:list>
                      <text:list-item>
                        <text:p>Accesses or bit-bangs the correct protocol for our LED type (WS2812B) and uC type.</text:p>
                      </text:list-item>
                      <text:list-item>
                        <text:p>Handles pin mode and timing.</text:p>
                      </text:list-item>
                      <text:list-item>
                        <text:p>Turns a contiguous block of memory into oohs and aah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de!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Code becomes hex</text:p>
                <text:list>
                  <text:list-item>
                    <text:p text:style-name="P1">Like an executable on a computer, but it’s basically the whole ROM</text:p>
                  </text:list-item>
                  <text:list-item>
                    <text:p text:style-name="P1">Normally fairly involved; here, it can stay simple</text:p>
                  </text:list-item>
                  <text:list-item>
                    <text:p text:style-name="P1">Use the IDE; we’ll talk about it</text:p>
                  </text:list-item>
                </text:list>
              </text:list-item>
              <text:list-item>
                <text:p text:style-name="P1">Defining constant values</text:p>
                <text:list>
                  <text:list-item>
                    <text:p text:style-name="P1"><text:span text:style-name="T2">const int DURATION = 1000 * 10;</text:span></text:p>
                  </text:list-item>
                </text:list>
              </text:list-item>
              <text:list-item>
                <text:p text:style-name="P1">Defining variable values</text:p>
                <text:list>
                  <text:list-item>
                    <text:p text:style-name="P1"><text:span text:style-name="T2">int starting_led_index = 0;</text:span></text:p>
                  </text:list-item>
                  <text:list-item>
                    <text:p text:style-name="P1">Inside or outside of a function (scope)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4">Defining functions</text:p>
                <text:list>
                  <text:list-item>
                    <text:p text:style-name="P1"><text:span text:style-name="T2">long get_time_to_next_frame(long current_time)</text:span></text:p>
                    <text:p text:style-name="P1"><text:span text:style-name="T2">{</text:span></text:p>
                    <text:list>
                      <text:list-header>
                        <text:p text:style-name="P1"><text:span text:style-name="T2">…</text:span></text:p>
                      </text:list-header>
                    </text:list>
                    <text:p text:style-name="P1"><text:span text:style-name="T2">}</text:span></text:p>
                  </text:list-item>
                </text:list>
              </text:list-item>
              <text:list-item>
                <text:p text:style-name="P4">Loops</text:p>
                <text:list>
                  <text:list-item>
                    <text:p text:style-name="P1">I<text:span text:style-name="T2">nt led_idx = 0;</text:span></text:p>
                    <text:p text:style-name="P1"><text:span text:style-name="T2">while(led_idx &lt; NUM_LEDS) { …; ++led_idx; }</text:span></text:p>
                  </text:list-item>
                  <text:list-item>
                    <text:p text:style-name="P1"><text:span text:style-name="T2">for (int led_idx = 0; led_idx &lt; NUM_LEDS; ++led_idx) { …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4">Structs and Classes</text:p>
                <text:list>
                  <text:list-item>
                    <text:p text:style-name="P1"><text:span text:style-name="T2">struct Segment {</text:span></text:p>
                    <text:list>
                      <text:list-header>
                        <text:p text:style-name="P1"><text:span text:style-name="T2">CRGB old_colors_[2];</text:span></text:p>
                        <text:p text:style-name="P1"><text:span text:style-name="T2">long transition_time_;</text:span></text:p>
                      </text:list-header>
                    </text:list>
                    <text:p text:style-name="P1"><text:span text:style-name="T2">};</text:span><text:span text:style-name="T2"><text:tab/></text:span><text:span text:style-name="T2"><text:tab/></text:span><text:span text:style-name="T2">// &lt;- semicolon! Don’t forget!</text:span></text:p>
                  </text:list-item>
                </text:list>
              </text:list-item>
              <text:list-item>
                <text:p text:style-name="P4">#include and libraries</text:p>
                <text:list>
                  <text:list-item>
                    <text:p text:style-name="P1">Inserts a file fulla code at that spot.</text:p>
                  </text:list-item>
                  <text:list-item>
                    <text:p text:style-name="P1">How we use libraries in code.</text:p>
                  </text:list-item>
                </text:list>
              </text:list-item>
              <text:list-item>
                <text:p text:style-name="P1">#define and macros</text:p>
                <text:list>
                  <text:list-item>
                    <text:p text:style-name="P1">Parameterized string replacement.</text:p>
                  </text:list-item>
                  <text:list-item>
                    <text:p text:style-name="P1">Generally considered bad these days. But everyone does it.</text:p>
                  </text:list-item>
                  <text:list-item>
                    <text:p text:style-name="P1">Fun to write, hard to r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t’s C++. arduino.cc has tutorials too, but .. it’s not as simple as it used to be.</text:p>
              </text:list-item>
              <text:list-item>
                <text:p>Learn C first if you’re new to this. (My recommendation; lots of microcontroller code really is C-like even though C++ works.)</text:p>
              </text:list-item>
              <text:list-item>
                <text:p>You don’t have to use arduino.h. It’s convenient, but proper tools like gcc will target the microcontroller. (-m flag).</text:p>
                <text:list>
                  <text:list-item>
                    <text:p>The IDE uses gcc underneath, or it used to anyway.</text:p>
                  </text:list-item>
                  <text:list-item>
                    <text:p>We’re not going to today, but dig into it for a good ti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GB, HSV, WTF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Each pixel has 3 LEDs (red, green, blue)</text:p>
              </text:list-item>
              <text:list-item>
                <text:p>Light colors mix that way due to protoreceptors – you likely know about that</text:p>
              </text:list-item>
              <text:list-item>
                <text:p>The RGB values just translate to PWM in each LED</text:p>
              </text:list-item>
              <text:list-item>
                <text:p>FastLED can automatically do some things:</text:p>
                <text:list>
                  <text:list-item>
                    <text:p>Maximum power level – limits and scaled RGB values to keep maximum light power lower</text:p>
                  </text:list-item>
                  <text:list-item>
                    <text:p>Some color modulation to increase yellow’s ran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GB space</text:p>
          </draw:text-box>
        </draw:frame>
        <draw:frame draw:style-name="gr2" draw:text-style-name="P5" draw:layer="layout" svg:width="9.134cm" svg:height="9.134cm" svg:x="11.183cm" svg:y="3.8cm" presentation:class="graphic">
          <draw:image xlink:href="Pictures/100000010000040000000400D670ED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GB, HSV, WTF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SV – hue, saturation, value</text:p>
              </text:list-item>
              <text:list-item>
                <text:p>A different representation of color in memory</text:p>
              </text:list-item>
              <text:list-item>
                <text:p>Hue: Red→Yellow→Green→Cyan→Blue→Magenta→Red</text:p>
              </text:list-item>
              <text:list-item>
                <text:p>Saturation: How colorful is it (gray→colorful)</text:p>
              </text:list-item>
              <text:list-item>
                <text:p>Value: How dark (black→full power)</text:p>
              </text:list-item>
              <text:list-item>
                <text:p>Just in software. FastLED can convert to RGB for pixel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SV space</text:p>
          </draw:text-box>
        </draw:frame>
        <draw:frame draw:style-name="gr2" draw:text-style-name="P5" draw:layer="layout" svg:width="12.178cm" svg:height="9.134cm" svg:x="9.661cm" svg:y="3.8cm" presentation:class="graphic">
          <draw:image xlink:href="Pictures/1000000000000640000004B0C0957D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w HSV is computed</text:p>
          </draw:text-box>
        </draw:frame>
        <draw:frame draw:style-name="gr2" draw:text-style-name="P5" draw:layer="layout" svg:width="12.445cm" svg:height="9.134cm" svg:x="9.527cm" svg:y="3.8cm" presentation:class="graphic">
          <draw:image xlink:href="Pictures/100030F400002E9D00002236BC4E3B04.svg" xlink:type="simple" xlink:show="embed" xlink:actuate="onLoad" draw:mime-type="image/svg+xml">
            <text:p/>
          </draw:image>
          <draw:image xlink:href="Pictures/10000001000001C30000014B8EDB4C4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FastLED setu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const int LED_STRIP_PIN = 13;<text:line-break/>const int LEDS_PER_METER = 60;<text:line-break/>const int METERS_PER_STRIP = 5;<text:line-break/>const int LEDS_PER_STRIP = LEDS_PER_METER * METERS_PER_STRIP;<text:line-break/><text:line-break/>CRGB frame_buffer[LEDS_PER_STRIP];<text:line-break/><text:line-break/>void setup()<text:line-break/>{<text:line-break/><text:tab/>FastLED.addLeds&lt;WS2812B, LED_STRIP_PIN, GRB&gt;(<text:line-break/><text:tab/><text:tab/> <text:s text:c="5"/>frame_buffer, LEDS_PER_STRIP);<text:line-break/><text:tab/>::memset(frame_buffer, 0, sizeof(CRGB) * LEDS_PER_STRIP);<text:line-break/>…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Animation Loo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void loop()<text:line-break/>{<text:line-break/><text:tab/>wait_for_next_frame();<text:line-break/><text:tab/>animate_strip();<text:line-break/><text:tab/>FastLED.show();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Animation Loop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void wait_for_next_frame()</text:p>
                <text:p>{<text:line-break/><text:tab/><text:tab/><text:tab/><text:tab/><text:tab/> <text:s/>current_time = millis(); // gets the # of ms since power-on</text:p>
                <text:list>
                  <text:list-header>
                    <text:p>if (current_time &lt; next_frame_time)</text:p>
                    <text:p>{</text:p>
                    <text:list>
                      <text:list-header>
                        <text:p>delay (next_frame_time – current_time);</text:p>
                        <text:p>next_frame_time += FRAME_DURATION;</text:p>
                      </text:list-header>
                    </text:list>
                    <text:p>}</text:p>
                    <text:p>else</text:p>
                    <text:p>{</text:p>
                    <text:list>
                      <text:list-header>
                        <text:p>next_frame_time = current_time + FRAME_DURATION;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ccessing and setting pixel valu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3">void animate_strip()</text:span><text:span text:style-name="T3"><text:line-break/></text:span><text:span text:style-name="T3">{</text:span><text:span text:style-name="T3"><text:line-break/></text:span><text:span text:style-name="T3"><text:tab/></text:span><text:span text:style-name="T3">for (int led_idx = 0;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led_idx &lt; LEDS_PER_STRIP; </text:span><text:span text:style-name="T3"><text:line-break/></text:span><text:span text:style-name="T3"><text:tab/></text:span><text:span text:style-name="T3"><text:tab/></text:span><text:span text:style-name="T3"> <text:s text:c="5"/>++led_idx)</text:span><text:span text:style-name="T3"><text:line-break/></text:span><text:span text:style-name="T3"><text:tab/></text:span><text:span text:style-name="T3">{</text:span><text:span text:style-name="T3"><text:line-break/></text:span><text:span text:style-name="T3"><text:tab/></text:span><text:span text:style-name="T3"><text:tab/></text:span><text:span text:style-name="T3"> <text:s text:c="5"/>// led_idx is the pixel index into the strip</text:span><text:span text:style-name="T3"><text:line-break/></text:span><text:span text:style-name="T3"><text:tab/></text:span><text:span text:style-name="T3"><text:tab/></text:span><text:span text:style-name="T3"><text:tab/></text:span><text:span text:style-name="T3"> <text:s text:c="5"/>// we don’t have to start at 0 though…</text:span><text:span text:style-name="T3"><text:line-break/></text:span><text:span text:style-name="T3"><text:line-break/></text:span><text:tab/><text:tab/><text:tab/> <text:s text:c="5"/>color = CHSV(led_idx * 255) / LEDS_PER_STRIP, 255, 127);<text:line-break/><text:tab/><text:tab/> <text:s text:c="5"/>frame_buffer[computed_idx] = color;<text:line-break/><text:tab/>}<text:line-break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ccessing and setting pixel valu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6">void animate_strip()<text:line-break/>{<text:line-break/><text:tab/>int starting_idx = (current_time / 100) % LEDS_PER_STRIP;<text:line-break/><text:tab/>for (int led_idx = 0; <text:line-break/><text:tab/><text:tab/><text:tab/><text:tab/><text:tab/><text:tab/><text:tab/><text:tab/> <text:s text:c="5"/>led_idx &lt; LEDS_PER_STRIP; <text:line-break/><text:tab/><text:tab/> <text:s text:c="5"/>++led_idx)<text:line-break/><text:tab/>{<text:line-break/><text:tab/><text:tab/> <text:s text:c="5"/>// led_idx is the pixel index into the strip<text:line-break/><text:tab/><text:tab/><text:tab/><text:tab/><text:tab/> <text:s text:c="5"/>int computed_idx = (led_idx + starting_idx) <text:line-break/><text:tab/><text:tab/> <text:s text:c="11"/>% LEDS_PER_STRIP;<text:line-break/><text:tab/><text:tab/> <text:s text:c="5"/>// computed_idx is somewhere in the strip<text:line-break/><text:line-break/><text:tab/><text:tab/><text:tab/> <text:s text:c="5"/>color = CHSV((led_idx * 255) / LEDS_PER_STRIP, 255, 127);<text:line-break/><text:tab/><text:tab/> <text:s text:c="5"/>frame_buffer[computed_idx] = color;<text:line-break/><text:tab/>}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ips!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Floating point values (float, double) can take longer to process, even if the board has an FPU.</text:p>
                <text:list>
                  <text:list-item>
                    <text:p>Use integers (short, int, long) wherever you can, especially in inner loops</text:p>
                  </text:list-item>
                </text:list>
              </text:list-item>
              <text:list-item>
                <text:p>Some integers are even better than others</text:p>
                <text:list>
                  <text:list-item>
                    <text:p>I like to use 1024 milliseconds per “second”, and 32 FPS</text:p>
                    <text:list>
                      <text:list-item>
                        <text:p>Mults and divides by these numbers turn into bitshifts – quick</text:p>
                      </text:list-item>
                    </text:list>
                  </text:list-item>
                </text:list>
              </text:list-item>
              <text:list-item>
                <text:p>Like in anything else, probably don’t optimize everything up front—but, if you know you’re gonna, and you know it’ll work, you can get a good handle on perf ea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ar tip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ESP32 is more than a math processor and bit-banger – there’s lots of hardware facilities</text:p>
                <text:list>
                  <text:list-item>
                    <text:p>Some LED strips actually use an SPI-like protocol</text:p>
                    <text:list>
                      <text:list-item>
                        <text:p>ESP32 has SPI hardware that can run in parallel to CPU</text:p>
                        <text:list>
                          <text:list-item>
                            <text:p>I haven’t tried this in particular yet</text:p>
                          </text:list-item>
                        </text:list>
                      </text:list-item>
                    </text:list>
                  </text:list-item>
                  <text:list-item>
                    <text:p>ESP32 has a facility for streaming RAM to a pin, converted via an interrupt</text:p>
                    <text:list>
                      <text:list-item>
                        <text:p>Essentially DMA to a protocol like WS2812B</text:p>
                      </text:list-item>
                      <text:list-item>
                        <text:p>And numerous parallel instances of this – drive eight strips at once in hardware, while the CPU is computing the next frame</text:p>
                        <text:list>
                          <text:list-item>
                            <text:p>I haven’t tried this either yet – that’s next for some projects</text:p>
                          </text:list-item>
                        </text:list>
                      </text:list-item>
                    </text:list>
                  </text:list-item>
                  <text:list-item>
                    <text:p>And let’s not forget BLE and Wifi are on most dev boa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riving with sensor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Using sensors to drive the animations is what makes things interesting</text:p>
                <text:list>
                  <text:list-item>
                    <text:p>Proximity sensors (ultrasound, maybe PIR)</text:p>
                  </text:list-item>
                  <text:list-item>
                    <text:p>Sound capture (especially spectral)</text:p>
                  </text:list-item>
                  <text:list-item>
                    <text:p>Temp, baro, IMU, whatever you can hook up</text:p>
                  </text:list-item>
                  <text:list-item>
                    <text:p>Even other boards—they’re cheap AF</text:p>
                  </text:list-item>
                  <text:list-item>
                    <text:p>Get stupid with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Accent_20_3">
      <style:graphic-properties draw:textarea-vertical-align="middle" draw:auto-grow-height="false" fo:min-height="0.104cm" fo:min-width="0cm" loext:decorative="false"/>
    </style:style>
    <style:style style:name="Mgr5" style:family="graphic" style:parent-style-name="Accent_20_1">
      <style:graphic-properties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5:00:59.085081737</meta:creation-date>
    <meta:editing-duration>P2DT9H2M44S</meta:editing-duration>
    <meta:editing-cycles>10</meta:editing-cycles>
    <meta:generator>LibreOffice/24.2.7.2$Linux_X86_64 LibreOffice_project/420$Build-2</meta:generator>
    <dc:title>DNA</dc:title>
    <dc:date>2026-06-26T22:46:36.411604715</dc:date>
    <meta:document-statistic meta:object-count="198"/>
  </office:meta>
</office:document-meta>
</file>